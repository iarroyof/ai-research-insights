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400000003D81355D62B6202C31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tomed" svg:font-family="Atomed" style:font-family-generic="modern" style:font-pitch="variable"/>
    <style:font-face style:name="Liberation Sans" svg:font-family="'Liberation Sans'" style:font-family-generic="modern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ndara" svg:font-family="Candara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2" style:family="graphic" style:parent-style-name="standard">
      <style:graphic-properties svg:stroke-color="#ffffff" draw:fill="none" draw:fill-color="#729fcf" draw:opacity="100%" draw:textarea-vertical-align="middle"/>
    </style:style>
    <style:style style:name="gr3" style:family="graphic" style:parent-style-name="Objeto_20_sin_20_relleno_20_ni_20_línea">
      <style:graphic-properties draw:stroke="none" draw:fill="none" draw:fill-color="#729fcf" draw:opacity="100%" draw:textarea-horizontal-align="center" draw:textarea-vertical-align="middle" draw:color-mode="standard" draw:luminance="0%" draw:contrast="0%" draw:gamma="100%" draw:red="0%" draw:green="0%" draw:blue="0%" fo:clip="rect(2.628cm, 1.916cm, 1.449cm, 2.342cm)" draw:image-opacity="100%" style:mirror="none"/>
    </style:style>
    <style:style style:name="gr4" style:family="graphic" style:parent-style-name="standard">
      <style:graphic-properties draw:stroke="none" svg:stroke-color="#000000" draw:fill="none" draw:fill-color="#729fcf" draw:opacity="100%" draw:auto-grow-height="false" draw:fit-to-size="false" style:shrink-to-fit="true" fo:min-height="7.37cm" draw:shadow="visible" draw:shadow-color="#b2b2b2" draw:shadow-opacity="85%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1.677cm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 draw:fill-color="#729fcf" draw:opacity="100%"/>
      <style:paragraph-properties fo:text-align="center"/>
    </style:style>
    <style:style style:name="P3" style:family="paragraph">
      <style:paragraph-properties fo:margin-top="0cm" fo:margin-bottom="0cm" fo:line-height="100%" fo:text-align="center" style:writing-mode="lr-tb"/>
    </style:style>
    <style:style style:name="P4" style:family="paragraph">
      <loext:graphic-properties draw:fill="none" draw:fill-color="#729fcf" draw:opacity="100%"/>
      <style:paragraph-properties fo:margin-top="0cm" fo:margin-bottom="0cm" fo:line-height="100%" fo:text-align="center" style:writing-mode="lr-tb"/>
      <style:text-properties fo:color="#023f62" loext:opacity="100%" style:font-name="Atomed" fo:font-size="72pt" fo:font-style="normal" fo:text-shadow="none" fo:font-weight="bold" style:font-size-asian="72pt" style:font-style-asian="normal" style:font-weight-asian="bold" style:font-size-complex="72pt" style:font-style-complex="normal" style:font-weight-complex="bold"/>
    </style:style>
    <style:style style:name="P5" style:family="paragraph">
      <loext:graphic-properties draw:fill="none" draw:fill-color="#ffffff"/>
      <style:paragraph-properties style:writing-mode="lr-tb"/>
      <style:text-properties fo:color="#a33e03" loext:opacity="100%" style:font-name="Atomed" fo:font-size="36pt" fo:font-weight="bold" style:font-size-asian="36pt" style:font-weight-asian="bold" style:font-size-complex="36pt" style:font-weight-complex="bold"/>
    </style:style>
    <style:style style:name="T1" style:family="text">
      <style:text-properties fo:color="#023f62" loext:opacity="100%" style:font-name="Atomed" fo:font-size="72pt" fo:font-style="normal" fo:text-shadow="none" fo:font-weight="bold" style:font-size-asian="72pt" style:font-style-asian="normal" style:font-weight-asian="bold" style:font-size-complex="72pt" style:font-style-complex="normal" style:font-weight-complex="bold"/>
    </style:style>
    <style:style style:name="T2" style:family="text">
      <style:text-properties fo:color="#a33e03" loext:opacity="100%" style:font-name="Atomed"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g>
          <draw:frame draw:style-name="gr1" draw:text-style-name="P1" draw:layer="layout" svg:width="0.502cm" svg:height="1.187cm" svg:x="23.55cm" svg:y="16.27cm">
            <draw:text-box>
              <text:p/>
            </draw:text-box>
          </draw:frame>
          <draw:path draw:style-name="gr2" draw:text-style-name="P2" draw:layer="layout" svg:width="7.722cm" svg:height="8.227cm" svg:x="7.207cm" svg:y="18.534cm" svg:viewBox="0 0 7723 8228" svg:d="M7723 4215c-261 303-181 721-353 1059-186 364-216 770-282 1164-67 397-303 741-388 1129-91 418-457 710-882 635-371-66-753 0-1129 0-377 0-753 0-1129 0-387 0-778 21-1164 0-379-20-812 136-1129-141-295-257-309-693-282-1059 30-398-49-843-494-1058-370-179-575-685-458-1094 107-374 53-753 70-1129 18-392 52-768 212-1164 159-393 293-744 459-1129 178-413 664-603 1093-776 376-151 753-262 1129-388 361-121 739 5 1094-106 374-117 745-97 1129-106 401-10 957-221 1164 283 158 384 349 743 494 1129l247 388 282 388 35 35z">
            <text:p/>
          </draw:path>
          <draw:frame draw:style-name="gr3" draw:text-style-name="P2" draw:layer="layout" svg:width="16.509cm" svg:height="15.874cm" svg:x="2.913cm" svg:y="2.3cm">
            <draw:image xlink:href="Pictures/1000020100000400000003D81355D62B6202C312.png" xlink:type="simple" xlink:show="embed" xlink:actuate="onLoad" draw:mime-type="image/png">
              <text:p/>
            </draw:image>
          </draw:frame>
          <draw:frame draw:style-name="gr4" draw:text-style-name="P4" draw:layer="layout" svg:width="22.225cm" svg:height="8.89cm" svg:x="-0.262cm" svg:y="17.24cm">
            <draw:text-box>
              <text:p text:style-name="P3"><text:span text:style-name="T1">Red</text:span></text:p>
              <text:p text:style-name="P3"><text:span text:style-name="T1">Neuronal</text:span></text:p>
            </draw:text-box>
          </draw:frame>
          <draw:frame draw:style-name="gr5" draw:text-style-name="P5" draw:layer="layout" svg:width="4.128cm" svg:height="1.927cm" svg:x="11.885cm" svg:y="10.89cm">
            <draw:text-box>
              <text:p><text:span text:style-name="T2">utm</text:span></text:p>
            </draw:text-box>
          </draw:frame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tomed" svg:font-family="Atomed" style:font-family-generic="modern" style:font-pitch="variable"/>
    <style:font-face style:name="Liberation Sans" svg:font-family="'Liberation Sans'" style:font-family-generic="modern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ndara" svg:font-family="Candara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2-25T13:19:48.352000000</meta:creation-date>
    <meta:editing-duration>PT1H55M28S</meta:editing-duration>
    <meta:editing-cycles>9</meta:editing-cycles>
    <meta:generator>LibreOffice/7.1.2.2$Windows_X86_64 LibreOffice_project/8a45595d069ef5570103caea1b71cc9d82b2aae4</meta:generator>
    <dc:date>2024-10-03T19:13:21.359000000</dc:date>
    <meta:document-statistic meta:object-count="6"/>
  </office:meta>
</office:document-meta>
</file>